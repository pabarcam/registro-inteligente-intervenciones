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quitectura de la solución</text:h>
      <text:h text:style-name="Heading_20_2" text:outline-level="2">1. Visión general</text:h>
      <text:p text:style-name="Text_20_body">La solución sigue una arquitectura web simple y modular, compuesta por:</text:p>
      <text:list text:style-name="L1">
        <text:list-item>
          <text:p text:style-name="P1">una interfaz web para usuarios,</text:p>
        </text:list-item>
        <text:list-item>
          <text:p text:style-name="P1">un servidor backend en Node.js,</text:p>
        </text:list-item>
        <text:list-item>
          <text:p text:style-name="P1">una capa de rutas y middleware,</text:p>
        </text:list-item>
        <text:list-item>
          <text:p text:style-name="P1">una base de datos local para el MVP,</text:p>
        </text:list-item>
        <text:list-item>
          <text:p text:style-name="P1">un módulo opcional de IA para síntesis de historial.</text:p>
        </text:list-item>
      </text:list>
      <text:h text:style-name="Heading_20_2" text:outline-level="2" text:is-list-header="true">2. Componentes principales</text:h>
      <text:h text:style-name="Heading_20_3" text:outline-level="3">Frontend</text:h>
      <text:list text:style-name="L2">
        <text:list-item>
          <text:p text:style-name="P2">Vistas renderizadas con EJS.</text:p>
        </text:list-item>
        <text:list-item>
          <text:p text:style-name="P2">Formularios para login, dashboard y registro de intervenciones.</text:p>
        </text:list-item>
        <text:list-item>
          <text:p text:style-name="P2">Interacción con reconocimiento de voz del navegador.</text:p>
        </text:list-item>
      </text:list>
      <text:h text:style-name="Heading_20_3" text:outline-level="3" text:is-list-header="true">Backend</text:h>
      <text:list text:style-name="L3">
        <text:list-item>
          <text:p text:style-name="P3">Servidor Express.</text:p>
        </text:list-item>
        <text:list-item>
          <text:p text:style-name="P3">Rutas para autenticación, dashboard e intervenciones.</text:p>
        </text:list-item>
        <text:list-item>
          <text:p text:style-name="P3">Middleware de autenticación para proteger pantallas.</text:p>
        </text:list-item>
      </text:list>
      <text:h text:style-name="Heading_20_3" text:outline-level="3" text:is-list-header="true">Datos</text:h>
      <text:list text:style-name="L4">
        <text:list-item>
          <text:p text:style-name="P4">Base de datos SQLite para el MVP.</text:p>
        </text:list-item>
        <text:list-item>
          <text:p text:style-name="P4">Tablas para usuarios, pacientes e intervenciones.</text:p>
        </text:list-item>
      </text:list>
      <text:h text:style-name="Heading_20_3" text:outline-level="3" text:is-list-header="true">Integración con IA</text:h>
      <text:list text:style-name="L5">
        <text:list-item>
          <text:p text:style-name="P5">Módulo opcional para generar resúmenes a partir del historial del paciente.</text:p>
        </text:list-item>
        <text:list-item>
          <text:p text:style-name="P5">Soporta fallback local si no hay API externa configurada.</text:p>
        </text:list-item>
        <text:list-item>
          <text:p text:style-name="P5">Está preparado para integrarse con servicios como Qwen.</text:p>
        </text:list-item>
      </text:list>
      <text:h text:style-name="Heading_20_2" text:outline-level="2" text:is-list-header="true">3. Flujo arquitectónico</text:h>
      <text:list text:style-name="L6">
        <text:list-item>
          <text:p text:style-name="P6">El usuario inicia sesión.</text:p>
        </text:list-item>
        <text:list-item>
          <text:p text:style-name="P6">El sistema verifica credenciales y crea una sesión.</text:p>
        </text:list-item>
        <text:list-item>
          <text:p text:style-name="P6">El usuario registra una intervención.</text:p>
        </text:list-item>
        <text:list-item>
          <text:p text:style-name="P6"><text:soft-page-break/>La información se guarda en la base de datos.</text:p>
        </text:list-item>
        <text:list-item>
          <text:p text:style-name="P6">El dashboard consulta los registros y genera síntesis.</text:p>
        </text:list-item>
      </text:list>
      <text:h text:style-name="Heading_20_2" text:outline-level="2" text:is-list-header="true">4. Consideraciones de despliegue</text:h>
      <text:p text:style-name="Text_20_body">En una primera etapa la solución puede ejecutarse en:</text:p>
      <text:list text:style-name="L7">
        <text:list-item>
          <text:p text:style-name="P7">un equipo local,</text:p>
        </text:list-item>
        <text:list-item>
          <text:p text:style-name="P7">un servidor de pruebas,</text:p>
        </text:list-item>
        <text:list-item>
          <text:p text:style-name="P7">un hosting con Node.js y acceso a archivos.</text:p>
        </text:list-item>
      </text:list>
      <text:p text:style-name="Text_20_body">Para escalabilidad futura se puede migrar a:</text:p>
      <text:list text:style-name="L8">
        <text:list-item>
          <text:p text:style-name="P8">PostgreSQL o MySQL,</text:p>
        </text:list-item>
        <text:list-item>
          <text:p text:style-name="P8">contenedores,</text:p>
        </text:list-item>
        <text:list-item>
          <text:p text:style-name="P8">despliegue en nube con monitoreo y respaldos.</text:p>
        </text:list-item>
      </text:list>
      <text:h text:style-name="Heading_20_2" text:outline-level="2" text:is-list-header="true">5. Decisiones de arquitectura</text:h>
      <text:list text:style-name="L9">
        <text:list-item>
          <text:p text:style-name="P9">Uso de Node.js para velocidad y simplicidad.</text:p>
        </text:list-item>
        <text:list-item>
          <text:p text:style-name="P9">SQLite para reducir costos y acelerar el desarrollo del MVP.</text:p>
        </text:list-item>
        <text:list-item>
          <text:p text:style-name="P9">Separación de rutas y lógica de negocio para facilitar mantenimiento.</text:p>
        </text:list-item>
        <text:list-item>
          <text:p text:style-name="P9">Diseño preparado para incorporar IA sin romper la arquitectura bas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4T18:16:48.398943500</meta:creation-date>
    <meta:print-date>2026-06-24T18:17:03.198696200</meta:print-date>
    <meta:printed-by>Archivos PDF</meta:printed-by>
    <dc:date>2026-06-25T01:23:03.579155900</dc:date>
    <meta:editing-duration>PT6H56M3S</meta:editing-duration>
    <meta:editing-cycles>1</meta:editing-cycles>
    <meta:document-statistic meta:table-count="0" meta:image-count="0" meta:object-count="0" meta:page-count="2" meta:paragraph-count="44" meta:word-count="289" meta:character-count="1723" meta:non-whitespace-character-count="1509"/>
    <meta:generator>LibreOffice/26.2.1.2$Windows_X86_64 LibreOffice_project/620$Build-2</meta:generator>
  </office:meta>
</office:document-meta>
</file>